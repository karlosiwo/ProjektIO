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8000002AFEECBBB77.png" manifest:media-type="image/png"/>
  <manifest:file-entry manifest:full-path="Pictures/10000001000002A1000002C5D84CD81D.png" manifest:media-type="image/png"/>
  <manifest:file-entry manifest:full-path="Pictures/10000001000004BF00000392997C9C78.png" manifest:media-type="image/png"/>
  <manifest:file-entry manifest:full-path="Pictures/100000010000019B000003473AA7070E.png" manifest:media-type="image/png"/>
  <manifest:file-entry manifest:full-path="Pictures/10000001000001E00000025A623CC54D.png" manifest:media-type="image/png"/>
  <manifest:file-entry manifest:full-path="Pictures/100000010000025D000002E3D91736B6.png" manifest:media-type="image/png"/>
  <manifest:file-entry manifest:full-path="Pictures/10000000000002C6000005B41AB7AE20.png" manifest:media-type="image/png"/>
  <manifest:file-entry manifest:full-path="Pictures/10000000000004EC00000672E7A948E8.png" manifest:media-type="image/png"/>
  <manifest:file-entry manifest:full-path="Pictures/100000010000046A000002BC0DA1FAEB.png" manifest:media-type="image/png"/>
  <manifest:file-entry manifest:full-path="Pictures/10000001000005B60000033524C3BC5E.png" manifest:media-type="image/png"/>
  <manifest:file-entry manifest:full-path="Pictures/10000001000002210000032BD970CD75.png" manifest:media-type="image/png"/>
  <manifest:file-entry manifest:full-path="Pictures/10000000000004B00000069A4CEED1BE.png" manifest:media-type="image/png"/>
  <manifest:file-entry manifest:full-path="Pictures/100000010000023A000002D2D484484D.png" manifest:media-type="image/png"/>
  <manifest:file-entry manifest:full-path="Pictures/1000000000000384000003983E58AF93.png" manifest:media-type="image/png"/>
  <manifest:file-entry manifest:full-path="Pictures/10000000000003A20000015E423BD877.png" manifest:media-type="image/png"/>
  <manifest:file-entry manifest:full-path="Pictures/10000001000004C8000001CC5FA436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lexMono Nerd Font" svg:font-family="'BlexMono Nerd Font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BlexMono Nerd Font" fo:font-size="12pt" fo:font-weight="bold" style:font-size-asian="12pt" style:font-size-complex="12pt"/>
    </style:style>
    <style:style style:name="P2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style:font-size-asian="12pt" style:font-size-complex="12pt"/>
    </style:style>
    <style:style style:name="P3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style:font-size-asian="12pt" style:font-size-complex="12pt"/>
    </style:style>
    <style:style style:name="P4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style:font-size-asian="12pt" style:font-size-complex="12pt"/>
    </style:style>
    <style:style style:name="P5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style:font-size-asian="12pt" style:font-size-complex="12pt"/>
    </style:style>
    <style:style style:name="P6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style:font-size-asian="12pt" style:font-size-complex="12pt"/>
    </style:style>
    <style:style style:name="P7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style:font-size-asian="12pt" style:font-size-complex="12pt"/>
    </style:style>
    <style:style style:name="P8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fo:font-weight="bold" style:font-size-asian="12pt" style:font-size-complex="12pt"/>
    </style:style>
    <style:style style:name="P9" style:family="paragraph" style:parent-style-name="Text_20_body" style:list-style-name="L7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style:font-size-asian="12pt" style:font-size-complex="12pt"/>
    </style:style>
    <style:style style:name="P10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BlexMono Nerd Font" fo:font-size="12pt" fo:font-style="italic" style:font-size-asian="12pt" style:font-size-complex="12pt"/>
    </style:style>
    <style:style style:name="P11" style:family="paragraph" style:parent-style-name="Text_20_body" style:list-style-name="L8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style:font-size-asian="12pt" style:font-size-complex="12pt"/>
    </style:style>
    <style:style style:name="P12" style:family="paragraph" style:parent-style-name="Text_20_body" style:list-style-name="L9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style:font-size-asian="12pt" style:font-size-complex="12pt"/>
    </style:style>
    <style:style style:name="P13" style:family="paragraph" style:parent-style-name="Text_20_body" style:list-style-name="L9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fo:font-weight="bold" style:font-size-asian="12pt" style:font-size-complex="12pt"/>
    </style:style>
    <style:style style:name="P14" style:family="paragraph" style:parent-style-name="Text_20_body" style:list-style-name="L10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style:font-size-asian="12pt" style:font-size-complex="12pt"/>
    </style:style>
    <style:style style:name="P15" style:family="paragraph" style:parent-style-name="Text_20_body" style:list-style-name="L10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fo:font-weight="bold" style:font-size-asian="12pt" style:font-size-complex="12pt"/>
    </style:style>
    <style:style style:name="P16" style:family="paragraph" style:parent-style-name="Text_20_body" style:list-style-name="L1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style:font-size-asian="12pt" style:font-size-complex="12pt"/>
    </style:style>
    <style:style style:name="P17" style:family="paragraph" style:parent-style-name="Text_20_body" style:list-style-name="L1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fo:font-weight="bold" style:font-size-asian="12pt" style:font-size-complex="12pt"/>
    </style:style>
    <style:style style:name="P18" style:family="paragraph" style:parent-style-name="Text_20_body" style:list-style-name="L1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fo:font-weight="bold" style:font-size-asian="12pt" style:font-size-complex="12pt"/>
    </style:style>
    <style:style style:name="P19" style:family="paragraph" style:parent-style-name="Text_20_body" style:list-style-name="L1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fo:font-style="italic" style:font-size-asian="12pt" style:font-size-complex="12pt"/>
    </style:style>
    <style:style style:name="P20" style:family="paragraph" style:parent-style-name="Text_20_body" style:list-style-name="L1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fo:font-weight="bold" style:font-size-asian="12pt" style:font-size-complex="12pt"/>
    </style:style>
    <style:style style:name="P21" style:family="paragraph" style:parent-style-name="Text_20_body" style:list-style-name="L1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fo:font-style="italic" style:font-size-asian="12pt" style:font-size-complex="12pt"/>
    </style:style>
    <style:style style:name="P22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BlexMono Nerd Font" fo:font-size="12pt" style:font-size-asian="12pt" style:font-size-complex="12pt"/>
    </style:style>
    <style:style style:name="P23" style:family="paragraph" style:parent-style-name="Text_20_body" style:list-style-name="L1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style:font-size-asian="12pt" style:font-size-complex="12pt"/>
    </style:style>
    <style:style style:name="P24" style:family="paragraph" style:parent-style-name="Text_20_body" style:list-style-name="L14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25" style:family="paragraph" style:parent-style-name="Text_20_body" style:list-style-name="L1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fo:font-weight="bold" officeooo:paragraph-rsid="002055ad" style:font-size-asian="12pt" style:font-size-complex="12pt"/>
    </style:style>
    <style:style style:name="P26" style:family="paragraph" style:parent-style-name="Text_20_body" style:list-style-name="L1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officeooo:paragraph-rsid="002055ad" style:font-size-asian="12pt" style:font-size-complex="12pt"/>
    </style:style>
    <style:style style:name="P27" style:family="paragraph" style:parent-style-name="Text_20_body" style:list-style-name="L16">
      <style:paragraph-properties fo:line-height="114%"/>
      <style:text-properties style:font-name="BlexMono Nerd Font" fo:font-size="12pt" style:font-size-asian="12pt" style:font-size-complex="12pt"/>
    </style:style>
    <style:style style:name="P28" style:family="paragraph" style:parent-style-name="Text_20_body" style:list-style-name="L17">
      <style:paragraph-properties fo:line-height="114%"/>
      <style:text-properties style:font-name="BlexMono Nerd Font" fo:font-size="12pt" style:font-size-asian="12pt" style:font-size-complex="12pt"/>
    </style:style>
    <style:style style:name="P29" style:family="paragraph" style:parent-style-name="Text_20_body" style:list-style-name="L18">
      <style:paragraph-properties fo:line-height="114%"/>
      <style:text-properties style:font-name="BlexMono Nerd Font" fo:font-size="12pt" style:font-size-asian="12pt" style:font-size-complex="12pt"/>
    </style:style>
    <style:style style:name="P30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style:font-size-asian="12pt" style:font-size-complex="12pt"/>
    </style:style>
    <style:style style:name="P31" style:family="paragraph" style:parent-style-name="Text_20_body" style:list-style-name="L1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fo:font-weight="bold" style:font-size-asian="12pt" style:font-size-complex="12pt"/>
    </style:style>
    <style:style style:name="P32" style:family="paragraph" style:parent-style-name="Text_20_body" style:list-style-name="L1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fo:font-style="italic" style:font-size-asian="12pt" style:font-size-complex="12pt"/>
    </style:style>
    <style:style style:name="P33" style:family="paragraph" style:parent-style-name="Text_20_body" style:list-style-name="L1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style:font-size-asian="12pt" style:font-size-complex="12pt"/>
    </style:style>
    <style:style style:name="P34" style:family="paragraph" style:parent-style-name="Text_20_body" style:list-style-name="L1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fo:font-weight="bold" officeooo:paragraph-rsid="0023996d" style:font-size-asian="12pt" style:font-size-complex="12pt"/>
    </style:style>
    <style:style style:name="P35" style:family="paragraph" style:parent-style-name="Text_20_body" style:list-style-name="L1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officeooo:paragraph-rsid="0023996d" style:font-size-asian="12pt" style:font-size-complex="12pt"/>
    </style:style>
    <style:style style:name="P36" style:family="paragraph" style:parent-style-name="Text_20_body" style:list-style-name="L19">
      <style:paragraph-properties fo:line-height="114%"/>
      <style:text-properties style:font-name="BlexMono Nerd Font" fo:font-size="12pt" style:font-size-asian="12pt" style:font-size-complex="12pt"/>
    </style:style>
    <style:style style:name="P37" style:family="paragraph" style:parent-style-name="Text_20_body" style:list-style-name="L20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style:font-size-asian="12pt" style:font-size-complex="12pt"/>
    </style:style>
    <style:style style:name="P38" style:family="paragraph" style:parent-style-name="Text_20_body" style:list-style-name="L2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style:font-size-asian="12pt" style:font-size-complex="12pt"/>
    </style:style>
    <style:style style:name="P39" style:family="paragraph" style:parent-style-name="Text_20_body" style:list-style-name="L2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style:font-size-asian="12pt" style:font-size-complex="12pt"/>
    </style:style>
    <style:style style:name="P40" style:family="paragraph" style:parent-style-name="Text_20_body" style:list-style-name="L2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style:font-size-asian="12pt" style:font-size-complex="12pt"/>
    </style:style>
    <style:style style:name="P41" style:family="paragraph" style:parent-style-name="Text_20_body" style:list-style-name="L2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fo:font-weight="bold" style:font-size-asian="12pt" style:font-size-complex="12pt"/>
    </style:style>
    <style:style style:name="P42" style:family="paragraph" style:parent-style-name="Text_20_body" style:list-style-name="L2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fo:font-style="italic" style:font-size-asian="12pt" style:font-size-complex="12pt"/>
    </style:style>
    <style:style style:name="P43" style:family="paragraph" style:parent-style-name="Text_20_body" style:list-style-name="L2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style:font-size-asian="12pt" style:font-size-complex="12pt"/>
    </style:style>
    <style:style style:name="P44" style:family="paragraph" style:parent-style-name="Text_20_body" style:list-style-name="L2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fo:font-weight="bold" style:font-size-asian="12pt" style:font-size-complex="12pt"/>
    </style:style>
    <style:style style:name="P45" style:family="paragraph" style:parent-style-name="Text_20_body" style:list-style-name="L2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style:font-size-asian="12pt" style:font-size-complex="12pt"/>
    </style:style>
    <style:style style:name="P46" style:family="paragraph" style:parent-style-name="Text_20_body">
      <style:paragraph-properties fo:line-height="114%"/>
      <style:text-properties style:font-name="BlexMono Nerd Font" fo:font-size="12pt" style:font-size-asian="12pt" style:font-size-complex="12pt"/>
    </style:style>
    <style:style style:name="P47" style:family="paragraph" style:parent-style-name="Text_20_body" style:list-style-name="L26">
      <style:paragraph-properties fo:line-height="114%"/>
      <style:text-properties style:font-name="BlexMono Nerd Font" fo:font-size="12pt" style:font-size-asian="12pt" style:font-size-complex="12pt"/>
    </style:style>
    <style:style style:name="P48" style:family="paragraph" style:parent-style-name="Text_20_body" style:list-style-name="L27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BlexMono Nerd Font" fo:font-size="12pt" style:font-size-asian="12pt" style:font-size-complex="12pt"/>
    </style:style>
    <style:style style:name="P49" style:family="paragraph" style:parent-style-name="Standard">
      <style:text-properties style:font-name="BlexMono Nerd Font"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officeooo:rsid="002355c3"/>
    </style:style>
    <style:style style:name="T3" style:family="text">
      <style:text-properties officeooo:rsid="0021d3f2"/>
    </style:style>
    <style:style style:name="T4" style:family="text">
      <style:text-properties officeooo:rsid="001e1e46"/>
    </style:style>
    <style:style style:name="T5" style:family="text">
      <style:text-properties style:font-name="BlexMono Nerd Font" fo:font-size="12pt" style:font-size-asian="12pt" style:font-size-complex="12pt"/>
    </style:style>
    <style:style style:name="T6" style:family="text">
      <style:text-properties fo:font-style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54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03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. Metryczka</text:p>
      <text:section text:style-name="Sect1" text:name="model-response-message-contentr_7e74156d2095e5d4">
        <text:list text:style-name="L1">
          <text:list-item>
            <text:p text:style-name="P2"><text:span text:style-name="T1">Uczelnia:</text:span> Politechnika Białostocka</text:p>
          </text:list-item>
          <text:list-item>
            <text:p text:style-name="P2"><text:span text:style-name="T1">Wydział:</text:span> Wydział Informatyki</text:p>
          </text:list-item>
          <text:list-item>
            <text:p text:style-name="P2"><text:span text:style-name="T1">Kierunek:</text:span> Informatyka</text:p>
          </text:list-item>
          <text:list-item>
            <text:p text:style-name="P2"><text:span text:style-name="T1">Przedmiot:</text:span> Inżynieria Oprogramowania</text:p>
          </text:list-item>
          <text:list-item>
            <text:p text:style-name="P2"><text:span text:style-name="T2">S</text:span><text:span text:style-name="T1">emestr studiów:</text:span> Semestr <text:span text:style-name="T3">I</text:span>V</text:p>
          </text:list-item>
          <text:list-item>
            <text:p text:style-name="P2"><text:span text:style-name="T1">Prowadzący:</text:span> dr M. Czajkowski</text:p>
          </text:list-item>
          <text:list-item>
            <text:p text:style-name="P2"><text:span text:style-name="T1">Data przekazania sprawozdania:</text:span> <text:span text:style-name="T4">14.06.2026</text:span></text:p>
          </text:list-item>
        </text:list>
        <text:p text:style-name="P1">0.1. Skład zespołu i podział pracy</text:p>
        <text:list text:style-name="L2">
          <text:list-item>
            <text:p text:style-name="P3"><text:bookmark text:name="p-rc_3f7373226460a2cf-158"/>Przemysław Pieszko: Przypadek użycia "Połączenie konta Steam/Discord", diagramy czynności i przebiegu dla tego procesu, diagram stanu dla integracji zewnętrznych. </text:p>
          </text:list-item>
          <text:list-item>
            <text:p text:style-name="P3"><text:bookmark text:name="p-rc_3f7373226460a2cf-159"/>Karol Ziemak: Przypadek użycia "Dopasowanie użytkowników (Match)", diagramy czynności i przebiegu dla matchmakingu, diagram stanu dla procesu dopasowania. </text:p>
          </text:list-item>
          <text:list-item>
            <text:p text:style-name="P3"><text:bookmark text:name="p-rc_3f7373226460a2cf-160"/>Kamil Osakowicz: Przypadek użycia "Zgłoszenie użytkownika", moduł moderacji, diagramy czynności, przebiegu oraz maszyna stanów dla cyklu życia zgłoszenia. </text:p>
          </text:list-item>
        </text:list>
        <text:p text:style-name="P1">0.2. Proponowana punktacja</text:p>
        <text:list text:style-name="L3">
          <text:list-item>
            <text:p text:style-name="P4">Przemysław Pieszko: 100%</text:p>
          </text:list-item>
          <text:list-item>
            <text:p text:style-name="P4">Karol Ziemak: 100%</text:p>
          </text:list-item>
          <text:list-item>
            <text:p text:style-name="P4">Kamil Osakowicz: 100%</text:p>
          </text:list-item>
        </text:list>
        <text:p text:style-name="P1">0.3. Adres (publiczny) repozytorium projektu</text:p>
        <text:list text:style-name="L4">
          <text:list-item>
            <text:p text:style-name="P5"><text:span text:style-name="T1">URL:</text:span> https://github.com/karlosiwo/ProjektIO</text:p>
          </text:list-item>
          <text:list-item>
            <text:p text:style-name="P5"><text:span text:style-name="T1">Dane dostępowe:</text:span> Repozytorium jest publiczne. </text:p>
          </text:list-item>
        </text:list>
        <text:p text:style-name="P1">1. Treść zadania projektowego</text:p>
        <text:list text:style-name="L5">
          <text:list-item>
            <text:p text:style-name="P6"><text:bookmark text:name="p-rc_3f7373226460a2cf-161"/>Aplikacja GamerMatch jest systemem klasy platformy matchmakingowej. </text:p>
          </text:list-item>
          <text:list-item>
            <text:p text:style-name="P6"><text:bookmark text:name="p-rc_3f7373226460a2cf-162"/>Jej głównym zadaniem jest łączenie graczy. </text:p>
          </text:list-item>
          <text:list-item>
            <text:p text:style-name="P6"><text:bookmark text:name="p-rc_3f7373226460a2cf-163"/>Proces łączenia odbywa się na podstawie ich preferencji, aktywności oraz danych zewnętrznych. </text:p>
          </text:list-item>
          <text:list-item>
            <text:p text:style-name="P6"><text:bookmark text:name="p-rc_3f7373226460a2cf-164"/><text:soft-page-break/>Obsługiwane zewnętrzne platformy danych to m.in. Steam oraz Discord. </text:p>
          </text:list-item>
        </text:list>
        <text:p text:style-name="P1">2. Cel budowania systemu, jego zakres oraz kontekst</text:p>
        <text:list text:style-name="L6">
          <text:list-item>
            <text:p text:style-name="P7"><text:span text:style-name="T1">Cel i kontekst:</text:span> Zbudowanie centralnej platformy społecznościowej dla graczy, integrującej profile z wielu ekosystemów gamingowych w celu automatyzacji poszukiwania partnerów do gry o zbliżonym poziomie i preferencjach.</text:p>
          </text:list-item>
          <text:list-item>
            <text:p text:style-name="P8">Mierzalne korzyści z wdrożenia:</text:p>
            <text:list>
              <text:list-item>
                <text:p text:style-name="P7">Skrócenie średniego czasu znalezienia partnera do wspólnej gry o minimum 60% (estymowane przejście z manualnego poszukiwania na forach/Discordach trwającego ok. 15 minut do "Matchu" w aplikacji w czasie 2-5 minut).</text:p>
              </text:list-item>
              <text:list-item>
                <text:p text:style-name="P7">Osiągnięcie miesięcznego przychodu rzędu 2 000 000 PLN w pierwszym roku po wdrożeniu funkcji premium.</text:p>
              </text:list-item>
            </text:list>
          </text:list-item>
          <text:list-item>
            <text:p text:style-name="P8">Niemierzalne korzyści z wdrożenia:</text:p>
            <text:list>
              <text:list-item>
                <text:p text:style-name="P7"><text:bookmark text:name="p-rc_3f7373226460a2cf-165"/>Lepsza jakość dopasowań w systemie. </text:p>
              </text:list-item>
              <text:list-item>
                <text:p text:style-name="P7"><text:bookmark text:name="p-rc_3f7373226460a2cf-166"/>Możliwość natychmiastowego rozpoczęcia rozmowy po dopasowaniu z graczem o podobnych zainteresowaniach. </text:p>
              </text:list-item>
              <text:list-item>
                <text:p text:style-name="P7"><text:bookmark text:name="p-rc_3f7373226460a2cf-167"/>Zwiększenie bezpieczeństwa i jakości społeczności. </text:p>
              </text:list-item>
              <text:list-item>
                <text:p text:style-name="P7"><text:bookmark text:name="p-rc_3f7373226460a2cf-168"/>Eliminacja toksycznych zachowań. </text:p>
              </text:list-item>
            </text:list>
          </text:list-item>
        </text:list>
        <text:p text:style-name="P1">3. Słownik</text:p>
        <text:list text:style-name="L7">
          <text:list-item>
            <text:p text:style-name="P9"><text:bookmark text:name="p-rc_3f7373226460a2cf-169"/><text:span text:style-name="T1">Match:</text:span> Wzajemne polubienie profili przez dwóch użytkowników, skutkujące utworzeniem dopasowania i odblokowaniem czatu. </text:p>
          </text:list-item>
          <text:list-item>
            <text:p text:style-name="P9"><text:bookmark text:name="p-rc_3f7373226460a2cf-170"/><text:span text:style-name="T1">Super Match:</text:span> Funkcja premium zwiększająca priorytet dopasowania dla wybranego profilu oraz szansę na szybsze połączenie. </text:p>
          </text:list-item>
          <text:list-item>
            <text:p text:style-name="P9"><text:bookmark text:name="p-rc_3f7373226460a2cf-171"/><text:span text:style-name="T1">Boost:</text:span> Opcja premium oferująca zwiększoną widoczność profilu gracza w module przeglądania. </text:p>
          </text:list-item>
          <text:list-item>
            <text:p text:style-name="P9"><text:bookmark text:name="p-rc_3f7373226460a2cf-172"/><text:span text:style-name="T1">Zewnętrzne API:</text:span> Interfejs programistyczny platform (np. Steam, Discord) umożliwiający weryfikację rang i osiągnięć. </text:p>
          </text:list-item>
        </text:list>
        <text:p text:style-name="P1">4. Perspektywa przypadków użycia</text:p>
        <text:p text:style-name="P1">4.1. Diagramy przypadków użycia</text:p>
        <text:p text:style-name="P10"><text:soft-page-break/><draw:frame draw:style-name="fr1" draw:name="Obraz 1" text:anchor-type="as-char" svg:width="6.7008in" svg:height="5.0402in" draw:z-index="0"><draw:image xlink:href="Pictures/10000001000004BF00000392997C9C78.png" xlink:type="simple" xlink:show="embed" xlink:actuate="onLoad" draw:mime-type="image/png"/></draw:frame></text:p>
        <text:p text:style-name="P1">4.1.1. Opisy tekstowe wszystkich aktorów</text:p>
        <text:list text:style-name="L8">
          <text:list-item>
            <text:p text:style-name="P11"><text:bookmark text:name="p-rc_3f7373226460a2cf-173"/><text:span text:style-name="T1">Gracz:</text:span> Główny aktor systemu inicjujący podstawowe akcje takie jak: rejestracja, przeglądanie profili, łączenie kont zewnętrznych, polubienia oraz komunikacja na czacie. </text:p>
          </text:list-item>
          <text:list-item>
            <text:p text:style-name="P11"><text:bookmark text:name="p-rc_3f7373226460a2cf-174"/><text:span text:style-name="T1">Moderator:</text:span> Aktor zarządzający odpowiedzialny za bezpieczeństwo platformy. Przegląda zgłoszenia trafiające do systemu i podejmuje działania administracyjne, w tym banowanie użytkowników. </text:p>
          </text:list-item>
          <text:list-item>
            <text:p text:style-name="P11"><text:bookmark text:name="p-rc_3f7373226460a2cf-175"/><text:span text:style-name="T1">Zewnętrzne API:</text:span> Aktor systemowy dostarczający na żądanie dane profilowe, statystyki i rangi graczy z platform powiązanych. </text:p>
          </text:list-item>
          <text:list-item>
            <text:p text:style-name="P11"><text:bookmark text:name="p-rc_3f7373226460a2cf-176"/><text:span text:style-name="T1">System płatności:</text:span> Zewnętrzny interfejs obsługujący transakcje związane z zakupem funkcji Premium i Boostów. </text:p>
          </text:list-item>
        </text:list>
        <text:p text:style-name="P1">4.1.2. Opisy tekstowe wybranych przypadków użycia</text:p>
        <text:p text:style-name="P1">Przypadek 1: Połączenie konta Steam/Discord</text:p>
        <text:list text:style-name="L9">
          <text:list-item>
            <text:p text:style-name="P12"><text:bookmark text:name="p-rc_3f7373226460a2cf-177"/><text:span text:style-name="T1">Nazwa przypadku:</text:span> Połączenie konta Steam/Discord </text:p>
          </text:list-item>
          <text:list-item>
            <text:p text:style-name="P12"><text:bookmark text:name="p-rc_3f7373226460a2cf-178"/><text:span text:style-name="T1">Aktorzy:</text:span> Gracz, Zewnętrzne API </text:p>
          </text:list-item>
          <text:list-item>
            <text:p text:style-name="P13"><text:soft-page-break/>Podstawowy ciąg zdarzeń:</text:p>
            <text:list>
              <text:list-item>
                <text:p text:style-name="P12"><text:bookmark text:name="p-rc_3f7373226460a2cf-179"/>System wyświetla opcję integracji kont w profilu użytkownika. </text:p>
              </text:list-item>
              <text:list-item>
                <text:p text:style-name="P12"><text:bookmark text:name="p-rc_3f7373226460a2cf-180"/>Gracz wybiera platformę (np. Steam lub Discord) do połączenia. </text:p>
              </text:list-item>
              <text:list-item>
                <text:p text:style-name="P12"><text:bookmark text:name="p-rc_3f7373226460a2cf-181"/>System przekierowuje użytkownika do zewnętrznego serwisu w celu autoryzacji. </text:p>
              </text:list-item>
              <text:list-item>
                <text:p text:style-name="P12"><text:bookmark text:name="p-rc_3f7373226460a2cf-182"/>Gracz loguje się i wyraża zgodę na dostęp do danych. </text:p>
              </text:list-item>
              <text:list-item>
                <text:p text:style-name="P12"><text:bookmark text:name="p-rc_3f7373226460a2cf-183"/>System nawiązuje połączenie z wykorzystaniem Zewnętrznego API. </text:p>
              </text:list-item>
              <text:list-item>
                <text:p text:style-name="P12"><text:bookmark text:name="p-rc_3f7373226460a2cf-184"/>System pobiera dane gracza (np. statystyki, ranga, osiągnięcia). </text:p>
              </text:list-item>
              <text:list-item>
                <text:p text:style-name="P12"><text:bookmark text:name="p-rc_3f7373226460a2cf-185"/>System aktualizuje profil użytkownika i wyświetla status "Connected". </text:p>
              </text:list-item>
            </text:list>
          </text:list-item>
          <text:list-item>
            <text:p text:style-name="P13">Alternatywne ciągi zdarzeń:</text:p>
            <text:list>
              <text:list-item>
                <text:p text:style-name="P12"><text:bookmark text:name="p-rc_3f7373226460a2cf-186"/>Błąd połączenia z API: System nie może pobrać danych; informuje Gracza o błędzie i umożliwia ponowienie próby. </text:p>
              </text:list-item>
              <text:list-item>
                <text:p text:style-name="P12"><text:bookmark text:name="p-rc_3f7373226460a2cf-187"/>Odmowa autoryzacji: Gracz nie wyraża zgody na dostęp do danych; system przerywa proces i powraca do edycji profilu. </text:p>
              </text:list-item>
              <text:list-item>
                <text:p text:style-name="P12"><text:bookmark text:name="p-rc_3f7373226460a2cf-188"/>Niepoprawne dane logowania: System informuje o błędzie logowania w serwisie zewnętrznym; użytkownik może ponowić próbę. </text:p>
              </text:list-item>
            </text:list>
          </text:list-item>
          <text:list-item>
            <text:p text:style-name="P13">Zależności czasowe:</text:p>
            <text:list>
              <text:list-item>
                <text:p text:style-name="P12"><text:bookmark text:name="p-rc_3f7373226460a2cf-189"/>Częstotliwość wykonania: sporadyczna (zwykle jednorazowa podczas konfiguracji profilu). </text:p>
              </text:list-item>
              <text:list-item>
                <text:p text:style-name="P12"><text:bookmark text:name="p-rc_3f7373226460a2cf-190"/>Przewidywane spiętrzenia: brak istotnych spiętrzeń. </text:p>
              </text:list-item>
              <text:list-item>
                <text:p text:style-name="P12"><text:bookmark text:name="p-rc_3f7373226460a2cf-191"/>Typowy czas realizacji: 30-60 sekund. </text:p>
              </text:list-item>
              <text:list-item>
                <text:p text:style-name="P12"><text:bookmark text:name="p-rc_3f7373226460a2cf-192"/>Maksymalny czas realizacji: zależny od czasu odpowiedzi zewnętrznego API. </text:p>
              </text:list-item>
            </text:list>
          </text:list-item>
          <text:list-item>
            <text:p text:style-name="P13">Wartości uzyskiwane po zakończeniu:</text:p>
            <text:list>
              <text:list-item>
                <text:p text:style-name="P12"><text:bookmark text:name="p-rc_3f7373226460a2cf-193"/>Zweryfikowane dane gracza (ranga, aktywność, osiągnięcia). </text:p>
              </text:list-item>
              <text:list-item>
                <text:p text:style-name="P12"><text:bookmark text:name="p-rc_3f7373226460a2cf-194"/><text:soft-page-break/>Lepsza jakość dopasowań w systemie. </text:p>
              </text:list-item>
            </text:list>
          </text:list-item>
        </text:list>
        <text:p text:style-name="P1">Przypadek 2: Dopasowanie użytkowników (Match)</text:p>
        <text:list text:style-name="L10">
          <text:list-item>
            <text:p text:style-name="P14"><text:bookmark text:name="p-rc_3f7373226460a2cf-195"/><text:span text:style-name="T1">Nazwa przypadku:</text:span> Dopasowanie użytkowników (Match) </text:p>
          </text:list-item>
          <text:list-item>
            <text:p text:style-name="P14"><text:bookmark text:name="p-rc_3f7373226460a2cf-196"/><text:span text:style-name="T1">Aktorzy:</text:span> Gracz </text:p>
          </text:list-item>
          <text:list-item>
            <text:p text:style-name="P15">Podstawowy ciąg zdarzeń:</text:p>
            <text:list>
              <text:list-item>
                <text:p text:style-name="P14"><text:bookmark text:name="p-rc_3f7373226460a2cf-197"/>Gracz uruchamia moduł przeglądania profili. </text:p>
              </text:list-item>
              <text:list-item>
                <text:p text:style-name="P14"><text:bookmark text:name="p-rc_3f7373226460a2cf-198"/>System wyświetla profile innych graczy na podstawie preferencji i statystyk. </text:p>
              </text:list-item>
              <text:list-item>
                <text:p text:style-name="P14"><text:bookmark text:name="p-rc_3f7373226460a2cf-199"/>Gracz analizuje profil i wybiera akcję „Polubienie". </text:p>
              </text:list-item>
              <text:list-item>
                <text:p text:style-name="P14"><text:bookmark text:name="p-rc_3f7373226460a2cf-200"/>System zapisuje decyzję użytkownika. </text:p>
              </text:list-item>
              <text:list-item>
                <text:p text:style-name="P14"><text:bookmark text:name="p-rc_3f7373226460a2cf-201"/>System sprawdza, czy drugi użytkownik również polubił profil Gracza. </text:p>
              </text:list-item>
              <text:list-item>
                <text:p text:style-name="P14"><text:bookmark text:name="p-rc_3f7373226460a2cf-202"/>W przypadku wzajemnego polubienia system tworzy dopasowanie (match). </text:p>
              </text:list-item>
              <text:list-item>
                <text:p text:style-name="P14"><text:bookmark text:name="p-rc_3f7373226460a2cf-203"/>System wyświetla komunikat „It's a Match!" oraz ekran dopasowania. </text:p>
              </text:list-item>
              <text:list-item>
                <text:p text:style-name="P14"><text:bookmark text:name="p-rc_3f7373226460a2cf-204"/>System umożliwia rozpoczęcie czatu z dopasowanym użytkownikiem. </text:p>
              </text:list-item>
            </text:list>
          </text:list-item>
          <text:list-item>
            <text:p text:style-name="P15">Alternatywne ciągi zdarzeń:</text:p>
            <text:list>
              <text:list-item>
                <text:p text:style-name="P14"><text:bookmark text:name="p-rc_3f7373226460a2cf-205"/>Odrzucenie profilu: Gracz wybiera opcję „Odrzucenie". System usuwa profil z widoku i wyświetla kolejny. </text:p>
              </text:list-item>
              <text:list-item>
                <text:p text:style-name="P14"><text:bookmark text:name="p-rc_3f7373226460a2cf-206"/>Brak wzajemnego dopasowania: Drugi użytkownik nie polubił profilu Gracza. System zapisuje decyzję i kontynuuje proces przeglądania. </text:p>
              </text:list-item>
              <text:list-item>
                <text:p text:style-name="P14"><text:bookmark text:name="p-rc_3f7373226460a2cf-207"/>Użycie funkcji Super Match: Gracz wybiera opcję „Super Match". System zwiększa priorytet dopasowania dla wybranego profilu. </text:p>
              </text:list-item>
            </text:list>
          </text:list-item>
          <text:list-item>
            <text:p text:style-name="P15">Zależności czasowe:</text:p>
            <text:list>
              <text:list-item>
                <text:p text:style-name="P14"><text:bookmark text:name="p-rc_3f7373226460a2cf-208"/>Częstotliwość wykonania: bardzo wysoka (wielokrotnie w trakcie jednej sesji). </text:p>
              </text:list-item>
              <text:list-item>
                <text:p text:style-name="P14"><text:bookmark text:name="p-rc_3f7373226460a2cf-209"/>Przewidywane spiętrzenia: godziny wieczorne, weekendy. </text:p>
              </text:list-item>
              <text:list-item>
                <text:p text:style-name="P14"><text:bookmark text:name="p-rc_3f7373226460a2cf-210"/>Typowy czas realizacji: kilka-kilkanaście sekund na jeden profil. </text:p>
              </text:list-item>
              <text:list-item>
                <text:p text:style-name="P14"><text:bookmark text:name="p-rc_3f7373226460a2cf-211"/><text:soft-page-break/>Maksymalny czas realizacji: nieokreślony. </text:p>
              </text:list-item>
            </text:list>
          </text:list-item>
          <text:list-item>
            <text:p text:style-name="P15">Wartości uzyskiwane po zakończeniu:</text:p>
            <text:list>
              <text:list-item>
                <text:p text:style-name="P14"><text:bookmark text:name="p-rc_3f7373226460a2cf-212"/>Dopasowanie z graczem o podobnych zainteresowaniach i poziomie. </text:p>
              </text:list-item>
              <text:list-item>
                <text:p text:style-name="P14"><text:bookmark text:name="p-rc_3f7373226460a2cf-213"/>Możliwość rozpoczęcia rozmowy. </text:p>
              </text:list-item>
            </text:list>
          </text:list-item>
        </text:list>
        <text:p text:style-name="P1">Przypadek 3: Zgłoszenie użytkownika</text:p>
        <text:list text:style-name="L11">
          <text:list-item>
            <text:p text:style-name="P16"><text:bookmark text:name="p-rc_3f7373226460a2cf-214"/><text:span text:style-name="T1">Nazwa przypadku:</text:span> Zgłoszenie użytkownika </text:p>
          </text:list-item>
          <text:list-item>
            <text:p text:style-name="P16"><text:bookmark text:name="p-rc_3f7373226460a2cf-215"/><text:span text:style-name="T1">Aktorzy:</text:span> Gracz, Moderator </text:p>
          </text:list-item>
          <text:list-item>
            <text:p text:style-name="P17">Podstawowy ciąg zdarzeń:</text:p>
            <text:list>
              <text:list-item>
                <text:p text:style-name="P16"><text:bookmark text:name="p-rc_3f7373226460a2cf-216"/>Gracz wybiera opcję „Zgłoszenie użytkownika" (np. w profilu lub czacie). </text:p>
              </text:list-item>
              <text:list-item>
                <text:p text:style-name="P16"><text:bookmark text:name="p-rc_3f7373226460a2cf-217"/>System wyświetla formularz zgłoszenia z listą powodów. </text:p>
              </text:list-item>
              <text:list-item>
                <text:p text:style-name="P16"><text:bookmark text:name="p-rc_3f7373226460a2cf-218"/>Gracz wybiera powód i zatwierdza zgłoszenie. </text:p>
              </text:list-item>
              <text:list-item>
                <text:p text:style-name="P16"><text:bookmark text:name="p-rc_3f7373226460a2cf-219"/>System zapisuje zgłoszenie w bazie danych. </text:p>
              </text:list-item>
              <text:list-item>
                <text:p text:style-name="P16"><text:bookmark text:name="p-rc_3f7373226460a2cf-220"/>System przeprowadza automatyczną analizę treści (AI). </text:p>
              </text:list-item>
              <text:list-item>
                <text:p text:style-name="P16"><text:bookmark text:name="p-rc_3f7373226460a2cf-221"/>Zgłoszenie trafia do kolejki w module dla Moderatora. </text:p>
              </text:list-item>
              <text:list-item>
                <text:p text:style-name="P16"><text:bookmark text:name="p-rc_3f7373226460a2cf-222"/>Moderator analizuje zgłoszenie i dostępne dowody. </text:p>
              </text:list-item>
              <text:list-item>
                <text:p text:style-name="P16"><text:bookmark text:name="p-rc_3f7373226460a2cf-223"/>Moderator podejmuje decyzję (np. ban lub ograniczenie konta). </text:p>
              </text:list-item>
              <text:list-item>
                <text:p text:style-name="P16"><text:bookmark text:name="p-rc_3f7373226460a2cf-224"/>System zapisuje decyzję i aktualizuje status użytkownika. </text:p>
              </text:list-item>
            </text:list>
          </text:list-item>
          <text:list-item>
            <text:p text:style-name="P17">Alternatywne ciągi zdarzeń:</text:p>
            <text:list>
              <text:list-item>
                <text:p text:style-name="P16"><text:bookmark text:name="p-rc_3f7373226460a2cf-225"/>Odrzucenie zgłoszenia: Moderator uznaje zgłoszenie za bezpodstawne. System zamyka zgłoszenie bez konsekwencji dla użytkownika. </text:p>
              </text:list-item>
              <text:list-item>
                <text:p text:style-name="P16"><text:bookmark text:name="p-rc_3f7373226460a2cf-226"/>Automatyczne ograniczenie konta: System wykrywa dużą liczbę zgłoszeń. System tymczasowo ogranicza widoczność profilu. </text:p>
              </text:list-item>
              <text:list-item>
                <text:p text:style-name="P16"><text:bookmark text:name="p-rc_3f7373226460a2cf-227"/>Błąd systemu: System nie może zapisać zgłoszenia i informuje użytkownika o problemie. </text:p>
              </text:list-item>
            </text:list>
          </text:list-item>
          <text:list-item>
            <text:p text:style-name="P17">Zależności czasowe:</text:p>
            <text:list>
              <text:list-item>
                <text:p text:style-name="P16"><text:bookmark text:name="p-rc_3f7373226460a2cf-228"/>Częstotliwość wykonania: zależna od aktywności użytkowników. </text:p>
              </text:list-item>
              <text:list-item>
                <text:p text:style-name="P16"><text:bookmark text:name="p-rc_3f7373226460a2cf-229"/><text:soft-page-break/>Przewidywane spiętrzenia: godziny wieczorne, duża aktywność użytkowników. </text:p>
              </text:list-item>
              <text:list-item>
                <text:p text:style-name="P16"><text:bookmark text:name="p-rc_3f7373226460a2cf-230"/>Typowy czas realizacji: zgłoszenie ~30 sekund, analiza kilka-kilkanaście minut. </text:p>
              </text:list-item>
              <text:list-item>
                <text:p text:style-name="P16"><text:bookmark text:name="p-rc_3f7373226460a2cf-231"/>Maksymalny czas realizacji: do kilku godzin (w zależności od kolejki zgłoszeń). </text:p>
              </text:list-item>
            </text:list>
          </text:list-item>
          <text:list-item>
            <text:p text:style-name="P17">Wartości uzyskiwane po zakończeniu:</text:p>
            <text:list>
              <text:list-item>
                <text:p text:style-name="P16"><text:bookmark text:name="p-rc_3f7373226460a2cf-232"/>Zwiększenie bezpieczeństwa i jakości społeczności. </text:p>
              </text:list-item>
              <text:list-item>
                <text:p text:style-name="P16"><text:bookmark text:name="p-rc_3f7373226460a2cf-233"/>Eliminacja toksycznych zachowań. </text:p>
              </text:list-item>
            </text:list>
          </text:list-item>
        </text:list>
        <text:p text:style-name="P1">4.2. Diagramy czynności</text:p>
        <text:list text:style-name="L12">
          <text:list-item>
            <text:p text:style-name="P18">Diagram 1: Połączenie konta Steam/Discord</text:p>
            <text:p text:style-name="P19"><text:soft-page-break/><draw:frame draw:style-name="fr1" draw:name="Image7" text:anchor-type="as-char" svg:width="6.3in" svg:height="6.6374in" draw:z-index="1"><draw:image xlink:href="Pictures/10000001000002A1000002C5D84CD81D.png" xlink:type="simple" xlink:show="embed" xlink:actuate="onLoad" draw:mime-type="image/png"/><svg:desc>diagram_czynnosci_integracja_steam_discord.png</svg:desc></draw:frame></text:p>
          </text:list-item>
          <text:list-item>
            <text:p text:style-name="P18">Diagram 2: Dopasowanie użytkowników (Match)</text:p>
            <text:p text:style-name="P19"><text:soft-page-break/><draw:frame draw:style-name="fr1" draw:name="Obraz 3" text:anchor-type="as-char" svg:width="6.3in" svg:height="6.4402in" draw:z-index="2"><draw:image xlink:href="Pictures/1000000000000384000003983E58AF93.png" xlink:type="simple" xlink:show="embed" xlink:actuate="onLoad" draw:mime-type="image/png"/><svg:desc>Diagram_Czynnosci_Dopasowanie_Uztykownikow.png</svg:desc></draw:frame></text:p>
          </text:list-item>
          <text:list-item>
            <text:p text:style-name="P18">Diagram 3: Zgłoszenie użytkownika</text:p>
            <text:p text:style-name="P19"><text:soft-page-break/><draw:frame draw:style-name="fr1" draw:name="Obraz 5" text:anchor-type="as-char" svg:width="6.5752in" svg:height="9.2543in" draw:z-index="3"><draw:image xlink:href="Pictures/10000000000004B00000069A4CEED1BE.png" xlink:type="simple" xlink:show="embed" xlink:actuate="onLoad" draw:mime-type="image/png"/><svg:desc>C:\Users\Karol\Downloads\zgloszenie czynnosci (1)1.png</svg:desc></draw:frame></text:p>
          </text:list-item>
        </text:list>
        <text:p text:style-name="P1">4.3. Diagramy interakcji (przebiegu)</text:p>
        <text:list text:style-name="L13">
          <text:list-item>
            <text:p text:style-name="P20">Diagram 1: Połączenie konta Steam/Discord</text:p>
            <text:p text:style-name="P21"><text:soft-page-break/><draw:frame draw:style-name="fr1" draw:name="Obraz 7" text:anchor-type="as-char" svg:width="4.2799in" svg:height="8.7362in" draw:z-index="4"><draw:image xlink:href="Pictures/100000010000019B000003473AA7070E.png" xlink:type="simple" xlink:show="embed" xlink:actuate="onLoad" draw:mime-type="image/png"/><svg:desc>diagram_przebiegu_integracja_steam_discord.png</svg:desc></draw:frame></text:p>
          </text:list-item>
          <text:list-item>
            <text:p text:style-name="P20">Diagram 2: Dopasowanie użytkowników (Match)</text:p>
            <text:p text:style-name="P21"><text:soft-page-break/><draw:frame draw:style-name="fr1" draw:name="Obraz 8" text:anchor-type="as-char" svg:width="4.6063in" svg:height="9.478in" draw:z-index="5"><draw:image xlink:href="Pictures/10000000000002C6000005B41AB7AE20.png" xlink:type="simple" xlink:show="embed" xlink:actuate="onLoad" draw:mime-type="image/png"/><svg:desc>Digram_Przebiegu_Dopasowanie_Uzytkownikow.png</svg:desc></draw:frame></text:p>
          </text:list-item>
          <text:list-item>
            <text:p text:style-name="P20">Diagram 3: Zgłoszenie użytkownika</text:p>
            <text:p text:style-name="P21"><text:soft-page-break/><draw:frame draw:style-name="fr1" draw:name="Obraz 9" text:anchor-type="as-char" svg:width="6.4571in" svg:height="8.4516in" draw:z-index="6"><draw:image xlink:href="Pictures/10000000000004EC00000672E7A948E8.png" xlink:type="simple" xlink:show="embed" xlink:actuate="onLoad" draw:mime-type="image/png"/><svg:desc>C:\Users\Karol\Downloads\przebieg zgloszenie.png</svg:desc></draw:frame></text:p>
          </text:list-item>
        </text:list>
        <text:p text:style-name="P1">5. Perspektywa projektowa</text:p>
        <text:p text:style-name="P1">5.0. Proponowana architektura systemu</text:p>
        <text:p text:style-name="P22">Zaproponowano architekturę mikrousługową (Microservices Architecture) w chmurze (Cloud). Logika backendowa obsługiwana jest przez usługi napisane w języku Java (Spring Boot) w celu <text:soft-page-break/>łatwego skalowania komponentów takich jak silnik Matchmakingu, Czat oraz integracja API. Frontend stanowić będzie wieloplatformowa aplikacja mobilna (iOS/Android). Usługi połączone są z klastrem relacyjnych (PostgreSQL) baz danych dla profili i transakcji.</text:p>
        <text:p text:style-name="P1">5.1. Diagram klas</text:p>
        <text:p text:style-name="P10"><draw:frame draw:style-name="fr2" draw:name="Image6" text:anchor-type="char" svg:width="6.6929in" svg:height="3.7583in" draw:z-index="15"><draw:image xlink:href="Pictures/10000001000005B60000033524C3BC5E.png" xlink:type="simple" xlink:show="embed" xlink:actuate="onLoad" draw:mime-type="image/png"/></draw:frame></text:p>
        <text:p text:style-name="P1">5.2. Uporządkowany alfabetycznie wykaz wszystkich klas</text:p>
        <text:list text:style-name="L14">
          <text:list-item>
            <text:p text:style-name="P23"><text:bookmark text:name="p-rc_3f7373226460a2cf-234"/><text:span text:style-name="T1">AkcjaMatch (Asynchroniczna decyzja użytkownika)</text:span> </text:p>
            <text:list>
              <text:list-item>
                <text:p text:style-name="P24"><text:bookmark text:name="p-rc_3f7373226460a2cf-235"/><text:span text:style-name="T5">Atrybuty: </text:span><text:span text:style-name="Source_20_Text"><text:span text:style-name="T5">oceniajacyId: int</text:span></text:span><text:span text:style-name="T5">, </text:span><text:span text:style-name="Source_20_Text"><text:span text:style-name="T5">ocenianyId: int</text:span></text:span><text:span text:style-name="T5">, </text:span><text:span text:style-name="Source_20_Text"><text:span text:style-name="T5">typAkcji: TypAkcji (polubienie/odrzucenie)</text:span></text:span><text:span text:style-name="T5"> </text:span></text:p>
              </text:list-item>
            </text:list>
          </text:list-item>
          <text:list-item>
            <text:p text:style-name="P23"><text:bookmark text:name="p-rc_3f7373226460a2cf-236"/><text:span text:style-name="T1">Dopasowanie (Instancja udanego Matchu)</text:span> </text:p>
            <text:list>
              <text:list-item>
                <text:p text:style-name="P24"><text:bookmark text:name="p-rc_3f7373226460a2cf-237"/><text:span text:style-name="T5">Atrybuty: </text:span><text:span text:style-name="Source_20_Text"><text:span text:style-name="T5">id: int</text:span></text:span><text:span text:style-name="T5">, </text:span><text:span text:style-name="Source_20_Text"><text:span text:style-name="T5">gracz1Id: int</text:span></text:span><text:span text:style-name="T5">, </text:span><text:span text:style-name="Source_20_Text"><text:span text:style-name="T5">gracz2Id: int</text:span></text:span><text:span text:style-name="T5">, </text:span><text:span text:style-name="Source_20_Text"><text:span text:style-name="T5">dataDopasowania: Date</text:span></text:span><text:span text:style-name="T5">, </text:span><text:span text:style-name="Source_20_Text"><text:span text:style-name="T5">czySuperMatch: boolean</text:span></text:span><text:span text:style-name="T5"> </text:span></text:p>
              </text:list-item>
              <text:list-item>
                <text:p text:style-name="P24"><text:bookmark text:name="p-rc_3f7373226460a2cf-238"/><text:span text:style-name="T5">Metody: </text:span><text:span text:style-name="Source_20_Text"><text:span text:style-name="T5">utworzCzat()</text:span></text:span><text:span text:style-name="T5"> </text:span></text:p>
              </text:list-item>
            </text:list>
          </text:list-item>
          <text:list-item>
            <text:p text:style-name="P23"><text:bookmark text:name="p-rc_3f7373226460a2cf-239"/><text:span text:style-name="T1">Gracz (Główny aktor)</text:span> </text:p>
            <text:list>
              <text:list-item>
                <text:p text:style-name="P24"><text:bookmark text:name="p-rc_3f7373226460a2cf-240"/><text:span text:style-name="T5">Atrybuty: </text:span><text:span text:style-name="Source_20_Text"><text:span text:style-name="T5">id: int</text:span></text:span><text:span text:style-name="T5">, </text:span><text:span text:style-name="Source_20_Text"><text:span text:style-name="T5">nazwa: String</text:span></text:span><text:span text:style-name="T5">, </text:span><text:span text:style-name="Source_20_Text"><text:span text:style-name="T5">statusKonta: String</text:span></text:span><text:span text:style-name="T5"> </text:span></text:p>
              </text:list-item>
              <text:list-item>
                <text:p text:style-name="P24"><text:bookmark text:name="p-rc_3f7373226460a2cf-241"/><text:span text:style-name="T5">Metody: </text:span><text:span text:style-name="Source_20_Text"><text:span text:style-name="T5">zainicjujPrzegladanie()</text:span></text:span><text:span text:style-name="T5">, </text:span><text:span text:style-name="Source_20_Text"><text:span text:style-name="T5">wybierzAkcjeMatch(profilId: int, akcja: String)</text:span></text:span><text:span text:style-name="T5">, </text:span><text:span text:style-name="Source_20_Text"><text:span text:style-name="T5">utworzZgloszenie(profilId: int, powod: String)</text:span></text:span><text:span text:style-name="T5"> </text:span></text:p>
              </text:list-item>
            </text:list>
          </text:list-item>
          <text:list-item>
            <text:p text:style-name="P23"><text:bookmark text:name="p-rc_3f7373226460a2cf-242"/><text:span text:style-name="T1">Interfejs ZewnetrzneAPI (Most komunikacyjny)</text:span> </text:p>
            <text:list>
              <text:list-item>
                <text:p text:style-name="P24"><text:bookmark text:name="p-rc_3f7373226460a2cf-243"/><text:soft-page-break/><text:span text:style-name="T5">Metody: </text:span><text:span text:style-name="Source_20_Text"><text:span text:style-name="T5">nawiazPolaczenie()</text:span></text:span><text:span text:style-name="T5">, </text:span><text:span text:style-name="Source_20_Text"><text:span text:style-name="T5">pobierzDaneGracza()</text:span></text:span><text:span text:style-name="T5"> </text:span></text:p>
              </text:list-item>
            </text:list>
          </text:list-item>
          <text:list-item>
            <text:p text:style-name="P23"><text:bookmark text:name="p-rc_3f7373226460a2cf-244"/><text:span text:style-name="T1">KontoZewnetrzne (Integracja platform)</text:span> </text:p>
            <text:list>
              <text:list-item>
                <text:p text:style-name="P24"><text:bookmark text:name="p-rc_3f7373226460a2cf-245"/><text:span text:style-name="T5">Atrybuty: </text:span><text:span text:style-name="Source_20_Text"><text:span text:style-name="T5">platforma: String</text:span></text:span><text:span text:style-name="T5">, </text:span><text:span text:style-name="Source_20_Text"><text:span text:style-name="T5">tokenAutoryzacji: String</text:span></text:span><text:span text:style-name="T5"> </text:span></text:p>
              </text:list-item>
              <text:list-item>
                <text:p text:style-name="P24"><text:bookmark text:name="p-rc_3f7373226460a2cf-246"/><text:span text:style-name="T5">Metody: </text:span><text:span text:style-name="Source_20_Text"><text:span text:style-name="T5">rozpocznijAutoryzacje()</text:span></text:span><text:span text:style-name="T5"> </text:span></text:p>
              </text:list-item>
            </text:list>
          </text:list-item>
          <text:list-item>
            <text:p text:style-name="P23"><text:bookmark text:name="p-rc_3f7373226460a2cf-247"/><text:span text:style-name="T1">Moderator (Aktor zarządzający)</text:span> </text:p>
            <text:list>
              <text:list-item>
                <text:p text:style-name="P24"><text:bookmark text:name="p-rc_3f7373226460a2cf-248"/><text:span text:style-name="T5">Atrybuty: </text:span><text:span text:style-name="Source_20_Text"><text:span text:style-name="T5">id: int</text:span></text:span><text:span text:style-name="T5">, </text:span><text:span text:style-name="Source_20_Text"><text:span text:style-name="T5">nazwa: String</text:span></text:span><text:span text:style-name="T5"> </text:span></text:p>
              </text:list-item>
              <text:list-item>
                <text:p text:style-name="P24"><text:bookmark text:name="p-rc_3f7373226460a2cf-249"/><text:span text:style-name="T5">Metody: </text:span><text:span text:style-name="Source_20_Text"><text:span text:style-name="T5">pobierzZgloszenia()</text:span></text:span><text:span text:style-name="T5">, </text:span><text:span text:style-name="Source_20_Text"><text:span text:style-name="T5">analizujDowody(zgloszenieId: int)</text:span></text:span><text:span text:style-name="T5">, </text:span><text:span text:style-name="Source_20_Text"><text:span text:style-name="T5">podejmijDecyzje(zgloszenieId: int, decyzja: String)</text:span></text:span><text:span text:style-name="T5"> </text:span></text:p>
              </text:list-item>
            </text:list>
          </text:list-item>
          <text:list-item>
            <text:p text:style-name="P23"><text:bookmark text:name="p-rc_3f7373226460a2cf-250"/><text:span text:style-name="T1">ModulAI (Zautomatyzowany silnik analizy)</text:span> </text:p>
            <text:list>
              <text:list-item>
                <text:p text:style-name="P24"><text:bookmark text:name="p-rc_3f7373226460a2cf-251"/><text:span text:style-name="T5">Metody: </text:span><text:span text:style-name="Source_20_Text"><text:span text:style-name="T5">analizujTresc(zgloszenie)</text:span></text:span><text:span text:style-name="T5">, </text:span><text:span text:style-name="Source_20_Text"><text:span text:style-name="T5">wykryjAnomalie()</text:span></text:span><text:span text:style-name="T5"> </text:span></text:p>
              </text:list-item>
            </text:list>
          </text:list-item>
          <text:list-item>
            <text:p text:style-name="P23"><text:bookmark text:name="p-rc_3f7373226460a2cf-252"/><text:span text:style-name="T1">Profil (Reprezentacja wizualna i statystyczna)</text:span> </text:p>
            <text:list>
              <text:list-item>
                <text:p text:style-name="P24"><text:bookmark text:name="p-rc_3f7373226460a2cf-253"/><text:span text:style-name="T5">Atrybuty: </text:span><text:span text:style-name="Source_20_Text"><text:span text:style-name="T5">id: int</text:span></text:span><text:span text:style-name="T5">, </text:span><text:span text:style-name="Source_20_Text"><text:span text:style-name="T5">graczId: int</text:span></text:span><text:span text:style-name="T5">, </text:span><text:span text:style-name="Source_20_Text"><text:span text:style-name="T5">preferencje: String</text:span></text:span><text:span text:style-name="T5">, </text:span><text:span text:style-name="Source_20_Text"><text:span text:style-name="T5">ranga: String</text:span></text:span><text:span text:style-name="T5">, </text:span><text:span text:style-name="Source_20_Text"><text:span text:style-name="T5">osiagniecia: String</text:span></text:span><text:span text:style-name="T5">, </text:span><text:span text:style-name="Source_20_Text"><text:span text:style-name="T5">statystykiGry: String</text:span></text:span><text:span text:style-name="T5">, </text:span><text:span text:style-name="Source_20_Text"><text:span text:style-name="T5">statusPolaczenia: String</text:span></text:span><text:span text:style-name="T5">, </text:span><text:span text:style-name="Source_20_Text"><text:span text:style-name="T5">widocznosc: boolean</text:span></text:span><text:span text:style-name="T5"> </text:span></text:p>
              </text:list-item>
            </text:list>
          </text:list-item>
          <text:list-item>
            <text:p text:style-name="P23"><text:bookmark text:name="p-rc_3f7373226460a2cf-254"/><text:span text:style-name="T1">Zgloszenie (Encja systemu moderacji)</text:span> </text:p>
            <text:list>
              <text:list-item>
                <text:p text:style-name="P24"><text:bookmark text:name="p-rc_3f7373226460a2cf-255"/><text:span text:style-name="T5">Atrybuty: </text:span><text:span text:style-name="Source_20_Text"><text:span text:style-name="T5">id: int</text:span></text:span><text:span text:style-name="T5">, </text:span><text:span text:style-name="Source_20_Text"><text:span text:style-name="T5">zgłaszajacyId: int</text:span></text:span><text:span text:style-name="T5">, </text:span><text:span text:style-name="Source_20_Text"><text:span text:style-name="T5">zgłoszonyId: int</text:span></text:span><text:span text:style-name="T5">, </text:span><text:span text:style-name="Source_20_Text"><text:span text:style-name="T5">powod: String</text:span></text:span><text:span text:style-name="T5">, </text:span><text:span text:style-name="Source_20_Text"><text:span text:style-name="T5">wynikAnalizyAI: String</text:span></text:span><text:span text:style-name="T5">, </text:span><text:span text:style-name="Source_20_Text"><text:span text:style-name="T5">status: String</text:span></text:span><text:span text:style-name="T5"> </text:span></text:p>
              </text:list-item>
            </text:list>
          </text:list-item>
        </text:list>
        <text:p text:style-name="P1">5.3. Diagramy stanów</text:p>
        <text:list xml:id="list951465702" text:style-name="L15">
          <text:list-item>
            <text:p text:style-name="P25">Diagram 1: Cykl życia dla instancji klasy KontoZewnetrzne (Połączenie konta Steam/Discord)</text:p>
          </text:list-item>
          <text:list-item>
            <text:p text:style-name="P26"><draw:frame draw:style-name="fr3" draw:name="Image1" text:anchor-type="char" svg:width="5.9374in" svg:height="7.5209in" draw:z-index="12"><draw:image xlink:href="Pictures/100000010000023A000002D2D484484D.png" xlink:type="simple" xlink:show="embed" xlink:actuate="onLoad" draw:mime-type="image/png"/></draw:frame><text:soft-page-break/><text:span text:style-name="T1">BrakAutoryzacji</text:span>: Stan bazowy integracji.</text:p>
          </text:list-item>
        </text:list>
        <text:list text:style-name="L16">
          <text:list-item>
            <text:p text:style-name="P27"><text:span text:style-name="T1">NawiazywaniePolaczenia</text:span>: Stan przejściowy. Oczekuje na token zwrotny (w przypadku błędu połączenia system wraca do stanu bazowego).</text:p>
          </text:list-item>
        </text:list>
        <text:list text:style-name="L17">
          <text:list-item>
            <text:p text:style-name="P28"><text:span text:style-name="T1">Autoryzowane</text:span>: Zewnętrzne API pomyślnie autoryzowało użytkownika, co pozwala na zainicjowanie pobierania danych.</text:p>
          </text:list-item>
        </text:list>
        <text:list text:style-name="L18">
          <text:list-item>
            <text:p text:style-name="P29"><text:span text:style-name="T1">Zintegrowane</text:span>: Stan docelowy. Odbyło się pobieranie statystyk, a interfejs wyświetla status "Connected".</text:p>
          </text:list-item>
        </text:list>
        <text:p text:style-name="P30"><text:soft-page-break/></text:p>
        <text:list xml:id="list155902881816083" text:continue-list="list951465702" text:style-name="L15">
          <text:list-item>
            <text:p text:style-name="P31">Diagram 2: Cykl życia instancji klasy Dopasowanie (Match)</text:p>
            <text:p text:style-name="P32"><draw:frame draw:style-name="fr1" draw:name="Obraz 11" text:anchor-type="as-char" svg:width="6.4173in" svg:height="2.4165in" draw:z-index="7"><draw:image xlink:href="Pictures/10000000000003A20000015E423BD877.png" xlink:type="simple" xlink:show="embed" xlink:actuate="onLoad" draw:mime-type="image/png"/><svg:desc>C:\Users\Karol\Downloads\diagram stanow2.png</svg:desc></draw:frame></text:p>
            <text:list>
              <text:list-item>
                <text:p text:style-name="P33"><text:bookmark text:name="p-rc_3f7373226460a2cf-260"/><text:span text:style-name="T1">Zainicjowane:</text:span> Stan początkowy nowo utworzonego dopasowania. </text:p>
              </text:list-item>
              <text:list-item>
                <text:p text:style-name="P33"><text:bookmark text:name="p-rc_3f7373226460a2cf-261"/><text:span text:style-name="T1">Aktywne:</text:span> Użytkownicy zostali poinformowani, gotowe do rozmowy. </text:p>
              </text:list-item>
              <text:list-item>
                <text:p text:style-name="P33"><text:bookmark text:name="p-rc_3f7373226460a2cf-262"/><text:span text:style-name="T1">Trwający Czat:</text:span> Użytkownicy aktywnie korzystają z kanału komunikacji. </text:p>
              </text:list-item>
              <text:list-item>
                <text:p text:style-name="P33"><text:bookmark text:name="p-rc_3f7373226460a2cf-263"/><text:span text:style-name="T1">Zablokowane/Anulowane:</text:span> Stany terminalne w przypadku bana od moderatora lub zerwania relacji (unmatch). </text:p>
              </text:list-item>
            </text:list>
          </text:list-item>
          <text:list-item>
            <text:p text:style-name="P34">Diagram 3: Cykl życia dla encji Zgloszenie</text:p>
          </text:list-item>
          <text:list-item>
            <text:p text:style-name="P35"><draw:frame draw:style-name="fr4" draw:name="Image8" text:anchor-type="char" svg:width="6.6929in" svg:height="2.5154in" draw:z-index="14"><draw:image xlink:href="Pictures/10000001000004C8000001CC5FA43669.png" xlink:type="simple" xlink:show="embed" xlink:actuate="onLoad" draw:mime-type="image/png"/></draw:frame><text:span text:style-name="T1">Nowe:</text:span> System utworzył obiekt zgłoszenia (inicjalizacja początkowego statusu oraz daty zgłoszenia).</text:p>
          </text:list-item>
        </text:list>
        <text:section text:style-name="Sect1" text:name="model-response-message-contentr_faffd0da6d6b5ce3">
          <text:list xml:id="list155902104003424" text:continue-list="list155902881816083" text:style-name="L19">
            <text:list-item>
              <text:p text:style-name="P36"><text:span text:style-name="T1">Weryfikowane:</text:span> Sprawdzenie poprawności danych wprowadzonych w formularzu.</text:p>
            </text:list-item>
            <text:list-item>
              <text:p text:style-name="P36"><text:soft-page-break/><text:span text:style-name="T1">Analizowane przez AI:</text:span> Analiza treści zgłoszenia przez moduł sztucznej inteligencji, kończąca się zapisem wyniku tej analizy.</text:p>
            </text:list-item>
            <text:list-item>
              <text:p text:style-name="P36"><text:span text:style-name="T1">W kolejce moderatora:</text:span> Skierowanie zgłoszenia do listy spraw oczekujących na ręczną weryfikację przez moderatora.</text:p>
            </text:list-item>
            <text:list-item>
              <text:p text:style-name="P36"><text:span text:style-name="T1">Zamknięte:</text:span> Stan terminalny następujący po podjęciu decyzji przez Moderatora. System zapisuje końcowy status zgłoszenia (zasadne lub bezpodstawne).</text:p>
            </text:list-item>
          </text:list>
        </text:section>
        <text:list text:continue-list="list155902104003424" text:style-name="L15">
          <text:list-item>
            <text:list>
              <text:list-item>
                <text:p text:style-name="P33"/>
              </text:list-item>
            </text:list>
          </text:list-item>
        </text:list>
        <text:p text:style-name="P1">5.4. Propozycje interfejsu użytkownika</text:p>
        <text:list text:style-name="L20">
          <text:list-item>
            <text:p text:style-name="P37"><text:bookmark text:name="p-rc_3f7373226460a2cf-269"/><text:span text:style-name="T1">Wybór platformy i gatunków gier (Level 1/2):</text:span> Ekran "Choose Your Arena", na którym użytkownik proszony jest o wybór preferowanych gatunków gier, aby system mógł lepiej dopasować partnerów. Widoczne opcje: FPS, MOBA, RPG, Battle Royale, <text:soft-page-break/>Strategy, Sports, Racing, MMO. <draw:frame draw:style-name="fr1" draw:name="Image2" text:anchor-type="as-char" svg:width="5.678in" svg:height="8.4492in" draw:z-index="8"><draw:image xlink:href="Pictures/10000001000002210000032BD970CD75.png" xlink:type="simple" xlink:show="embed" xlink:actuate="onLoad" draw:mime-type="image/png"/></draw:frame></text:p>
          </text:list-item>
          <text:list-item>
            <text:p text:style-name="P37"><text:bookmark text:name="p-rc_3f7373226460a2cf-270"/><text:span text:style-name="T1">Ekran łączenia profili zewnętrznych (Level 2/2):</text:span> Ekran "Link Your Profiles" do podłączenia zewnętrznych kont (Steam, PlayStation, Discord) w celu weryfikacji rangi i osiągnięć. <text:soft-page-break/>Statusy "Connected". <draw:frame draw:style-name="fr1" draw:name="Image3" text:anchor-type="as-char" svg:width="5.0008in" svg:height="6.2717in" draw:z-index="9"><draw:image xlink:href="Pictures/10000001000001E00000025A623CC54D.png" xlink:type="simple" xlink:show="embed" xlink:actuate="onLoad" draw:mime-type="image/png"/></draw:frame></text:p>
          </text:list-item>
          <text:list-item>
            <text:p text:style-name="P37"><text:bookmark text:name="p-rc_3f7373226460a2cf-271"/><text:span text:style-name="T1">Ekran przeglądania (Swipe):</text:span> Widoczny profil gracza (nazwa, wiek, ranga), informacja o preferowanej grze i roli. Na dole znajdują się przyciski akcji: odrzucenie (X), supermatch <text:soft-page-break/>(błyskawica), polubienie (serce). <draw:frame draw:style-name="fr1" draw:name="Image4" text:anchor-type="as-char" svg:width="4.5839in" svg:height="7.1571in" draw:z-index="10"><draw:image xlink:href="Pictures/10000001000001B8000002AFEECBBB77.png" xlink:type="simple" xlink:show="embed" xlink:actuate="onLoad" draw:mime-type="image/png"/></draw:frame></text:p>
          </text:list-item>
          <text:list-item>
            <text:p text:style-name="P37"><text:bookmark text:name="p-rc_3f7373226460a2cf-272"/><text:span text:style-name="T1">Ekran Dopasowania (Match):</text:span> Informuje o wzajemnym dopasowaniu ("It's a Match!"). Umożliwia natychmiastowe rozpoczęcie rozmowy ("Send Message"), powrót do przeglądania ("Keep Swiping") oraz prezentuje wspólne zainteresowania (Common <text:soft-page-break/>Interests). <draw:frame draw:style-name="fr1" draw:name="Image5" text:anchor-type="as-char" svg:width="6.3in" svg:height="7.6953in" draw:z-index="11"><draw:image xlink:href="Pictures/100000010000025D000002E3D91736B6.png" xlink:type="simple" xlink:show="embed" xlink:actuate="onLoad" draw:mime-type="image/png"/></draw:frame></text:p>
          </text:list-item>
        </text:list>
        <text:p text:style-name="P1">6. Wymagania niefunkcjonalne dla system</text:p>
        <text:p text:style-name="P1">6.1. Oszacowanie wielkości bazy danych</text:p>
        <text:p text:style-name="P22">Dla platformy zakładającej 100 000 aktywnych użytkowników, dane profilowe, statystyki pobrane z API zewn. oraz metadane czatu oszacowano na potrzebę początkowej pojemności ~500 GB z rocznym tempem przyrostu o około 300 GB. Należy zastosować partycjonowanie <text:soft-page-break/>oraz mechanizmy archiwizacji dla nieaktywnych profili i starszych logów czatu.</text:p>
        <text:p text:style-name="P1">6.2. Propozycja wymaganych czasów odpowiedzi</text:p>
        <text:list text:style-name="L21">
          <text:list-item>
            <text:p text:style-name="P38"><text:bookmark text:name="p-rc_3f7373226460a2cf-273"/>Analiza zgłoszenia i pobranie wyników w module przeglądania: czas rzędu kilku-kilkunastu sekund na jeden profil. </text:p>
          </text:list-item>
          <text:list-item>
            <text:p text:style-name="P38"><text:bookmark text:name="p-rc_3f7373226460a2cf-274"/>Czas połączenia z zewnętrznym API do pobrania danych ranga/statystyki: 30-60 sekund w zależności od serwisu docelowego. </text:p>
          </text:list-item>
          <text:list-item>
            <text:p text:style-name="P38"><text:bookmark text:name="p-rc_3f7373226460a2cf-275"/>Zapisanie zgłoszenia użytkownika: typowo ~30 sekund. </text:p>
          </text:list-item>
        </text:list>
        <text:p text:style-name="P1">6.3. Oszacowanie liczby i typów potrzebnych stanowisk pracy użytkowników systemu</text:p>
        <text:list text:style-name="L22">
          <text:list-item>
            <text:p text:style-name="P39"><text:bookmark text:name="p-rc_3f7373226460a2cf-276"/>Stanowiska operatorskie/developerskie: 10 osób dla działów Product &amp; Tech (Programiści Mobile, Backend, DevOps, UI/UX, QA, AI). </text:p>
          </text:list-item>
          <text:list-item>
            <text:p text:style-name="P39"><text:bookmark text:name="p-rc_3f7373226460a2cf-277"/>Stanowiska moderacyjne (obsługa 24/7): 3 osoby przypisane wyłącznie do obsługi kolejki zgłoszeń i utrzymywania bezpieczeństwa społeczności. </text:p>
          </text:list-item>
        </text:list>
        <text:p text:style-name="P1">7. Propozycja technologii informatycznych</text:p>
        <text:list text:style-name="L23">
          <text:list-item>
            <text:p text:style-name="P40"><text:bookmark text:name="p-rc_3f7373226460a2cf-278"/><text:span text:style-name="T1">Sprzęt i środowisko serwerowe (Cloud):</text:span> Koszt infrastruktury chmurowej, w tym serwerów i baz danych jest szacowany na 200 000 PLN miesięcznie. Chmura dostarcza usługi maszyn wirtualnych do konteneryzacji. </text:p>
          </text:list-item>
          <text:list-item>
            <text:p text:style-name="P40"><text:bookmark text:name="p-rc_3f7373226460a2cf-279"/><text:span text:style-name="T1">Oprogramowanie i Języki:</text:span> Integracje API pisane np. w językach skompilowanych do szybkiego działania (Java/Rust). Moduł analizy obrazów i treści dla moderacji będzie bazował na wytrenowanych modelach AI wykrywających toksyczne zachowania. </text:p>
          </text:list-item>
          <text:list-item>
            <text:p text:style-name="P41">Diagram wdrożenia:</text:p>
            <text:p text:style-name="P42"><draw:frame draw:style-name="fr3" draw:name="Image9" text:anchor-type="char" svg:width="6.3972in" svg:height="3.9626in" draw:z-index="13"><draw:image xlink:href="Pictures/100000010000046A000002BC0DA1FAEB.png" xlink:type="simple" xlink:show="embed" xlink:actuate="onLoad" draw:mime-type="image/png"/></draw:frame><text:soft-page-break/></text:p>
          </text:list-item>
        </text:list>
        <text:p text:style-name="P22"><text:bookmark text:name="p-rc_3f7373226460a2cf-280"/><text:span text:style-name="T1">8. Propozycja planu pracy</text:span> Plan pracy przygotowania wersji MVP, sumarycznie trwający 5-6 miesięcy: </text:p>
        <text:list text:style-name="L24">
          <text:list-item>
            <text:p text:style-name="P43"><text:bookmark text:name="p-rc_3f7373226460a2cf-281"/><text:span text:style-name="T1">Etap 1:</text:span> Analiza wymagań i projekt systemu (2 tygodnie). </text:p>
          </text:list-item>
          <text:list-item>
            <text:p text:style-name="P43"><text:bookmark text:name="p-rc_3f7373226460a2cf-282"/><text:span text:style-name="T1">Etap 2:</text:span> Projekt interfejsu użytkownika UX/UI (3 tygodnie). Wymaga zakończenia Etapu 1. </text:p>
          </text:list-item>
          <text:list-item>
            <text:p text:style-name="P43"><text:bookmark text:name="p-rc_3f7373226460a2cf-283"/><text:span text:style-name="T1">Etap 3:</text:span> Implementacja rejestracji, logowania i profilu gracza (4 tygodnie). Alokacja: Zespół Backend + Mobile. </text:p>
          </text:list-item>
          <text:list-item>
            <text:p text:style-name="P43"><text:bookmark text:name="p-rc_3f7373226460a2cf-284"/><text:span text:style-name="T1">Etap 4:</text:span> Integracja z platformami Steam/Discord (3 tygodnie). Wymaga istnienia struktury z Etapu 3. </text:p>
          </text:list-item>
          <text:list-item>
            <text:p text:style-name="P43"><text:bookmark text:name="p-rc_3f7373226460a2cf-285"/><text:span text:style-name="T1">Etap 5:</text:span> Implementacja mechanizmu dopasowań (5 tygodni). Główny silnik, alokacja: Backend, AI. </text:p>
          </text:list-item>
          <text:list-item>
            <text:p text:style-name="P43"><text:bookmark text:name="p-rc_3f7373226460a2cf-286"/><text:span text:style-name="T1">Etap 6:</text:span> Implementacja czatu i powiadomień (4 tygodnie). Zależność po ukończeniu Etapu 5. </text:p>
          </text:list-item>
          <text:list-item>
            <text:p text:style-name="P43"><text:bookmark text:name="p-rc_3f7373226460a2cf-287"/><text:span text:style-name="T1">Etap 7:</text:span> Funkcje premium, boost i płatności (3 tygodnie). </text:p>
          </text:list-item>
          <text:list-item>
            <text:p text:style-name="P43"><text:bookmark text:name="p-rc_3f7373226460a2cf-288"/><text:span text:style-name="T1">Etap 8:</text:span> Moduł zgłoszeń, moderacji i analizy AI (4 tygodnie). </text:p>
          </text:list-item>
          <text:list-item>
            <text:p text:style-name="P43"><text:bookmark text:name="p-rc_3f7373226460a2cf-289"/><text:span text:style-name="T1">Etap 9:</text:span> Testowanie, poprawki i optymalizacja (4 tygodnie). Angażuje QA po wdrożeniach funkcji z etapów 3-8. </text:p>
          </text:list-item>
          <text:list-item>
            <text:p text:style-name="P43"><text:bookmark text:name="p-rc_3f7373226460a2cf-290"/><text:span text:style-name="T1">Etap 10:</text:span> Wdrożenie wersji MVP (2 tygodnie). Ostatni etap produkcyjny przed startem. </text:p>
          </text:list-item>
        </text:list>
        <text:p text:style-name="P1"><text:soft-page-break/>9. Analiza ryzyka projektu</text:p>
        <text:list text:style-name="L25">
          <text:list-item>
            <text:p text:style-name="P44">Zagrożenie 1: Niestabilność Zewnętrznych API (Steam/Discord)</text:p>
            <text:list>
              <text:list-item>
                <text:p text:style-name="P45"><text:span text:style-name="T6">Szansa:</text:span> Duże. Zewnętrzne systemy regularnie zmieniają reguły ograniczania żądań (rate limiting).</text:p>
              </text:list-item>
              <text:list-item>
                <text:p text:style-name="P45"><text:span text:style-name="T6">Stopień szkodliwości:</text:span> Średni (paraliżuje proces integracji nowych kont).</text:p>
              </text:list-item>
              <text:list-item>
                <text:p text:style-name="P45"><text:span text:style-name="T6">Zapobieganie:</text:span> Implementacja asynchronicznych kolejek oraz tolerancji na błędy; zapamiętywanie stanów częściowych w cache.</text:p>
              </text:list-item>
              <text:list-item>
                <text:p text:style-name="P45"><text:span text:style-name="T6">Plan awaryjny:</text:span> Umożliwienie graczom manualnej weryfikacji przez zrzuty ekranu kontrolowane przez Moderatora.</text:p>
              </text:list-item>
            </text:list>
          </text:list-item>
          <text:list-item>
            <text:p text:style-name="P44">Zagrożenie 2: Zalanie platformy fałszywymi kontami/botami</text:p>
            <text:list>
              <text:list-item>
                <text:p text:style-name="P45"><text:span text:style-name="T6">Szansa:</text:span> Średnie.</text:p>
              </text:list-item>
              <text:list-item>
                <text:p text:style-name="P45"><text:span text:style-name="T6">Stopień szkodliwości:</text:span> Duży (zaburza dopasowania wewnątrz platformy).</text:p>
              </text:list-item>
              <text:list-item>
                <text:p text:style-name="P45"><text:span text:style-name="T6">Zapobieganie:</text:span> Zaawansowane narzędzia analizy zachowań AI (heurystyki) oraz twarde uwierzytelnianie (CAPTCHA).</text:p>
              </text:list-item>
              <text:list-item>
                <text:p text:style-name="P45"><text:span text:style-name="T6">Plan awaryjny:</text:span> Wstrzymanie ruchu rejestracyjnego, wdrożenie banowania po adresach IP.</text:p>
              </text:list-item>
            </text:list>
          </text:list-item>
        </text:list>
        <text:p text:style-name="P1">10. Kosztorys realizacji przedsięwzięcia</text:p>
        <text:p text:style-name="P46">Łączny czas przygotowania wersji MVP systemu wynosi około 5-6 miesięcy. Przy utrzymaniu miesięcznym zespołu oraz infrastruktury, budżet wynosi 540 000 PLN na miesiąc. Dalszy rozwój po wydaniu MVP może potrwać kolejne 3-6 miesięcy.</text:p>
        <text:p text:style-name="P46">Rozbicie na moduły i zespoły (kwoty miesięczne):</text:p>
        <text:list text:style-name="L26">
          <text:list-item>
            <text:p text:style-name="P47"><text:span text:style-name="T1">Dział Product &amp; Tech (10 osób):</text:span> Programiści (Mobile, Backend, DevOps), UI/UX, QA, AI - <text:span text:style-name="T1">300 000 PLN</text:span> (obejmuje wynagrodzenia, licencje, sprzęt oraz koszty stanowisk pracy).</text:p>
          </text:list-item>
          <text:list-item>
            <text:p text:style-name="P47"><text:span text:style-name="T1">Dział Marketing &amp; Growth (5 osób):</text:span> Kampanie, influencerzy, pozyskiwanie użytkowników - <text:span text:style-name="T1">120 000 PLN</text:span> (obejmuje koszty zespołu oraz miesięczny budżet na kampanie reklamowe).</text:p>
          </text:list-item>
          <text:list-item>
            <text:p text:style-name="P47"><text:span text:style-name="T1">Dział Administracja i Zarząd (2 osoby):</text:span> HR, finanse, prawo - <text:span text:style-name="T1">60 000 PLN</text:span>.</text:p>
          </text:list-item>
          <text:list-item>
            <text:p text:style-name="P47"><text:soft-page-break/><text:span text:style-name="T1">Dział Moderacja i Wsparcie (3 osoby):</text:span> Obsługa zgłoszeń 24/7 - <text:span text:style-name="T1">40 000 PLN</text:span>.</text:p>
          </text:list-item>
          <text:list-item>
            <text:p text:style-name="P47"><text:span text:style-name="T1">Infrastruktura (Cloud):</text:span> Serwery, bazy danych - <text:span text:style-name="T1">20 000 PLN</text:span>.</text:p>
          </text:list-item>
        </text:list>
        <text:p text:style-name="P22"/>
        <text:p text:style-name="P1">Warunki płatności i odbiór:</text:p>
        <text:list text:style-name="L27">
          <text:list-item>
            <text:p text:style-name="P48">Fakturowanie zrealizowanych prac odbywa się w cyklu miesięcznym na podstawie udokumentowanych roboczogodzin oraz zatwierdzonego dostępu do testowych wersji funkcjonalnych na środowisku Staging.</text:p>
          </text:list-item>
          <text:list-item>
            <text:p text:style-name="P48">Ostateczny odbiór wersji MVP potwierdzony pisemnym protokołem odbioru końcowego przez inwestora po okresie ustabilizowanych testów UAT z załogą testową QA. Poziom SLA ustalony na poziomie 99.5%.</text:p>
          </text:list-item>
        </text:list>
      </text:section>
      <text:p text:style-name="P4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lexMono Nerd Font" svg:font-family="'BlexMono Nerd Font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3T23:04:46.353150669</meta:creation-date>
    <meta:generator>LibreOffice/26.2.4.2$Linux_X86_64 LibreOffice_project/c44d3140fc62714965bf5d98735e0d79ba4b1ebd</meta:generator>
    <meta:print-date>2026-06-14T15:56:15.295294833</meta:print-date>
    <meta:printed-by>PDF files</meta:printed-by>
    <dc:date>2026-06-14T15:59:00.729949714</dc:date>
    <meta:editing-duration>PT5M42S</meta:editing-duration>
    <meta:editing-cycles>3</meta:editing-cycles>
    <meta:document-statistic meta:table-count="0" meta:image-count="16" meta:object-count="0" meta:page-count="26" meta:paragraph-count="233" meta:word-count="2236" meta:character-count="16924" meta:non-whitespace-character-count="14983"/>
  </office:meta>
</office:document-meta>
</file>